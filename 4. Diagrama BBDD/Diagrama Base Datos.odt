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C00000269915AA8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roman" style:font-pitch="variable"/>
    <style:font-face style:name="Century gothic" svg:font-family="'Century gothic'"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Roboto" svg:font-family="Robot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s" fo:country="ES" officeooo:rsid="00131be6" officeooo:paragraph-rsid="00131be6"/>
    </style:style>
    <style:style style:name="P2" style:family="paragraph" style:parent-style-name="Standard" style:master-page-name="">
      <loext:graphic-properties draw:fill="none"/>
      <style:paragraph-properties fo:margin-left="0cm" fo:margin-right="0cm" fo:margin-top="0cm" fo:margin-bottom="0.101cm" style:contextual-spacing="false" fo:text-align="start" style:justify-single-word="false" fo:text-indent="0cm" style:auto-text-indent="false" style:page-number="auto" fo:background-color="transparent">
        <style:tab-stops>
          <style:tab-stop style:position="8.899cm" style:type="center"/>
        </style:tab-stops>
      </style:paragraph-properties>
      <style:text-properties fo:font-variant="small-caps" fo:color="#ffffff" loext:opacity="100%" style:font-name="Century gothic" fo:font-size="54pt" fo:letter-spacing="normal" fo:language="es" fo:country="ES" officeooo:rsid="01523226" officeooo:paragraph-rsid="01523226" style:font-size-asian="47.25pt" style:font-size-complex="54pt"/>
    </style:style>
    <style:style style:name="P3" style:family="paragraph" style:parent-style-name="Standard">
      <loext:graphic-properties draw:fill="none"/>
      <style:paragraph-properties fo:margin-left="0cm" fo:margin-right="0cm" fo:margin-top="0cm" fo:margin-bottom="0.101cm" style:contextual-spacing="false" fo:text-align="start" style:justify-single-word="false" fo:text-indent="0cm" style:auto-text-indent="false" fo:background-color="transparent">
        <style:tab-stops>
          <style:tab-stop style:position="8.29cm" style:type="center"/>
        </style:tab-stops>
      </style:paragraph-properties>
      <style:text-properties fo:font-variant="small-caps" fo:color="#000000" loext:opacity="100%" style:font-name="Century gothic" fo:font-size="54pt" fo:letter-spacing="0.106cm" fo:language="es" fo:country="ES" officeooo:rsid="018a4171" officeooo:paragraph-rsid="018a4171" style:font-size-asian="47.25pt" style:font-size-complex="54pt"/>
    </style:style>
    <style:style style:name="P4" style:family="paragraph" style:parent-style-name="Standard">
      <style:paragraph-properties fo:text-align="center" style:justify-single-word="false">
        <style:tab-stops>
          <style:tab-stop style:position="8.714cm" style:type="center"/>
        </style:tab-stops>
      </style:paragraph-properties>
      <style:text-properties fo:font-variant="small-caps" style:font-name="Century gothic" fo:font-size="13pt" fo:language="es" fo:country="ES" officeooo:rsid="0064e2df" officeooo:paragraph-rsid="0064e2df" style:font-size-asian="11.3500003814697pt" style:font-size-complex="13pt"/>
    </style:style>
    <style:style style:name="P5" style:family="paragraph" style:parent-style-name="Standard">
      <style:paragraph-properties fo:text-align="center" style:justify-single-word="false">
        <style:tab-stops>
          <style:tab-stop style:position="8.714cm" style:type="center"/>
        </style:tab-stops>
      </style:paragraph-properties>
      <style:text-properties fo:font-size="16pt" fo:language="es" fo:country="ES" fo:font-weight="bold" officeooo:rsid="0064e2df" officeooo:paragraph-rsid="006ff292" style:font-size-asian="14pt" style:font-weight-asian="bold" style:font-size-complex="16pt" style:font-weight-complex="bold"/>
    </style:style>
    <style:style style:name="P6" style:family="paragraph" style:parent-style-name="Standard">
      <style:paragraph-properties fo:text-align="start" style:justify-single-word="false">
        <style:tab-stops>
          <style:tab-stop style:position="8.296cm"/>
          <style:tab-stop style:position="8.798cm"/>
          <style:tab-stop style:position="8.983cm" style:type="center"/>
        </style:tab-stops>
      </style:paragraph-properties>
      <style:text-properties fo:font-variant="small-caps" style:font-name="Century gothic" fo:font-size="16pt" fo:language="es" fo:country="ES" fo:font-weight="bold" officeooo:rsid="0064e2df" officeooo:paragraph-rsid="006ff292" style:font-size-asian="14pt" style:font-weight-asian="bold" style:font-size-complex="16pt" style:font-weight-complex="bold"/>
    </style:style>
    <style:style style:name="P7" style:family="paragraph" style:parent-style-name="Standard">
      <style:paragraph-properties fo:text-align="center" style:justify-single-word="false">
        <style:tab-stops>
          <style:tab-stop style:position="8.714cm" style:type="center"/>
        </style:tab-stops>
      </style:paragraph-properties>
      <style:text-properties fo:font-variant="small-caps" style:font-name="Century gothic" fo:font-size="16pt" fo:language="es" fo:country="ES" fo:font-weight="bold" officeooo:rsid="0064e2df" officeooo:paragraph-rsid="0064e2df" style:font-size-asian="14pt" style:font-weight-asian="bold" style:font-size-complex="16pt" style:font-weight-complex="bold"/>
    </style:style>
    <style:style style:name="P8" style:family="paragraph" style:parent-style-name="Standard">
      <style:paragraph-properties fo:margin-top="0cm" fo:margin-bottom="0.101cm" style:contextual-spacing="false" fo:text-align="start" style:justify-single-word="false">
        <style:tab-stops>
          <style:tab-stop style:position="6.8cm"/>
        </style:tab-stops>
      </style:paragraph-properties>
      <style:text-properties fo:font-variant="small-caps" fo:color="#c9211e" loext:opacity="100%" style:font-name="Century gothic" fo:font-size="16pt" fo:language="es" fo:country="ES" fo:font-weight="bold" officeooo:rsid="007360cd" officeooo:paragraph-rsid="007360cd" style:font-size-asian="14pt" style:font-weight-asian="bold" style:font-size-complex="16pt" style:font-weight-complex="bold"/>
    </style:style>
    <style:style style:name="P9" style:family="paragraph" style:parent-style-name="Standard">
      <style:paragraph-properties fo:text-align="center" style:justify-single-word="false">
        <style:tab-stops>
          <style:tab-stop style:position="8.184cm" style:type="center"/>
        </style:tab-stops>
      </style:paragraph-properties>
      <style:text-properties fo:font-variant="small-caps" style:font-name="Century gothic" fo:font-size="16pt" fo:language="es" fo:country="ES" fo:font-weight="bold" officeooo:rsid="0064e2df" officeooo:paragraph-rsid="0067f641" style:font-size-asian="14pt" style:font-weight-asian="bold" style:font-size-complex="16pt" style:font-weight-complex="bold"/>
    </style:style>
    <style:style style:name="P10" style:family="paragraph" style:parent-style-name="Standard">
      <style:paragraph-properties fo:text-align="start" style:justify-single-word="false">
        <style:tab-stops>
          <style:tab-stop style:position="7.396cm"/>
        </style:tab-stops>
      </style:paragraph-properties>
      <style:text-properties fo:font-variant="small-caps" style:font-name="Century gothic" fo:font-size="16pt" fo:language="es" fo:country="ES" fo:font-weight="bold" officeooo:rsid="0066d0a8" officeooo:paragraph-rsid="015b6650" style:font-size-asian="14pt" style:font-weight-asian="bold" style:font-size-complex="16pt" style:font-weight-complex="bold"/>
    </style:style>
    <style:style style:name="P11" style:family="paragraph" style:parent-style-name="Standard">
      <style:paragraph-properties fo:text-align="start" style:justify-single-word="false">
        <style:tab-stops>
          <style:tab-stop style:position="7.396cm"/>
        </style:tab-stops>
      </style:paragraph-properties>
      <style:text-properties fo:font-size="16pt" fo:language="es" fo:country="ES" fo:font-weight="bold" officeooo:rsid="0066d0a8" officeooo:paragraph-rsid="015b6650" style:font-size-asian="14pt" style:font-weight-asian="bold" style:font-size-complex="16pt" style:font-weight-complex="bold"/>
    </style:style>
    <style:style style:name="P12" style:family="paragraph" style:parent-style-name="Standard">
      <style:paragraph-properties fo:text-align="start" style:justify-single-word="false">
        <style:tab-stops>
          <style:tab-stop style:position="7.502cm"/>
          <style:tab-stop style:position="7.594cm"/>
        </style:tab-stops>
      </style:paragraph-properties>
      <style:text-properties fo:font-size="16pt" fo:language="es" fo:country="ES" officeooo:rsid="0066d0a8" officeooo:paragraph-rsid="0069de60" style:font-size-asian="14pt" style:font-size-complex="16pt"/>
    </style:style>
    <style:style style:name="P13" style:family="paragraph" style:parent-style-name="Standard">
      <style:text-properties style:font-name="Caladea" fo:font-size="10pt" fo:language="es" fo:country="ES" officeooo:rsid="017fbb91" officeooo:paragraph-rsid="016475cb" style:font-size-asian="10pt" style:font-size-complex="10pt"/>
    </style:style>
    <style:style style:name="P14" style:family="paragraph" style:parent-style-name="Text_20_body">
      <style:text-properties style:font-name="Caladea" fo:font-size="10pt" fo:language="es" fo:country="ES" officeooo:rsid="01876a97" officeooo:paragraph-rsid="01876a97" style:font-size-asian="10pt" style:font-size-complex="10pt"/>
    </style:style>
    <style:style style:name="P15" style:family="paragraph" style:parent-style-name="Text_20_body">
      <style:paragraph-properties fo:break-before="page"/>
      <style:text-properties style:font-name="Caladea" fo:font-size="14pt" fo:language="es" fo:country="ES" officeooo:rsid="01876a97" officeooo:paragraph-rsid="01876a97" style:font-size-asian="14pt" style:font-size-complex="14pt"/>
    </style:style>
    <style:style style:name="P16" style:family="paragraph" style:parent-style-name="Heading_20_3">
      <style:paragraph-properties fo:margin-top="0cm" fo:margin-bottom="0.247cm" style:contextual-spacing="false" fo:line-height="115%"/>
      <style:text-properties style:font-name="Caladea" fo:font-size="10pt" officeooo:rsid="01876a97" style:font-size-asian="10pt" style:font-size-complex="10pt"/>
    </style:style>
    <style:style style:name="P17" style:family="paragraph" style:parent-style-name="Text_20_body" style:list-style-name="L1">
      <style:text-properties style:font-name="Caladea" fo:font-size="10pt" officeooo:rsid="01876a97" style:font-size-asian="10pt" style:font-size-complex="10pt"/>
    </style:style>
    <style:style style:name="P18" style:family="paragraph" style:parent-style-name="Text_20_body" style:list-style-name="L2">
      <style:text-properties style:font-name="Caladea" fo:font-size="10pt" officeooo:rsid="01876a97" style:font-size-asian="10pt" style:font-size-complex="10pt"/>
    </style:style>
    <style:style style:name="P19" style:family="paragraph" style:parent-style-name="Text_20_body" style:list-style-name="L3">
      <style:text-properties style:font-name="Caladea" fo:font-size="10pt" officeooo:rsid="01876a97" style:font-size-asian="10pt" style:font-size-complex="10pt"/>
    </style:style>
    <style:style style:name="P20" style:family="paragraph" style:parent-style-name="Text_20_body">
      <style:text-properties style:font-name="Caladea" fo:font-size="15pt" fo:language="es" fo:country="ES" officeooo:rsid="018a4171" officeooo:paragraph-rsid="018a4171" style:font-size-asian="15pt" style:font-size-complex="15pt"/>
    </style:style>
    <style:style style:name="P21" style:family="paragraph" style:parent-style-name="Text_20_body">
      <style:paragraph-properties fo:text-align="center" style:justify-single-word="false" fo:break-before="page"/>
      <style:text-properties style:font-name="Caladea" fo:font-size="21pt" fo:language="es" fo:country="ES" officeooo:rsid="018a4171" officeooo:paragraph-rsid="018a4171" style:font-size-asian="21pt" style:font-size-complex="21pt"/>
    </style:style>
    <style:style style:name="P22" style:family="paragraph" style:parent-style-name="Standard">
      <style:text-properties style:font-name="Caladea" fo:font-size="10pt" fo:language="es" fo:country="ES" officeooo:rsid="01876a97" officeooo:paragraph-rsid="01876a97" style:font-size-asian="10pt" style:font-size-complex="10pt"/>
    </style:style>
    <style:style style:name="P23" style:family="paragraph" style:parent-style-name="Standard">
      <style:paragraph-properties fo:text-align="center" style:justify-single-word="false"/>
      <style:text-properties style:font-name="Caladea" fo:font-size="24pt" fo:language="es" fo:country="ES" fo:font-weight="bold" officeooo:rsid="018a4171" officeooo:paragraph-rsid="018a4171" style:font-size-asian="24pt" style:font-weight-asian="bold" style:font-size-complex="24pt" style:font-weight-complex="bold"/>
    </style:style>
    <style:style style:name="P24" style:family="paragraph">
      <loext:graphic-properties draw:fill="solid" draw:fill-color="#f9f9f9"/>
      <style:paragraph-properties fo:text-align="center"/>
    </style:style>
    <style:style style:name="P25" style:family="paragraph">
      <loext:graphic-properties draw:fill="solid" draw:fill-color="#1c1c1c"/>
      <style:paragraph-properties fo:text-align="center"/>
    </style:style>
    <style:style style:name="T1" style:family="text">
      <style:text-properties fo:color="#000000" loext:opacity="100%"/>
    </style:style>
    <style:style style:name="T2" style:family="text">
      <style:text-properties fo:letter-spacing="0.106cm" officeooo:rsid="018a4171"/>
    </style:style>
    <style:style style:name="T3" style:family="text">
      <style:text-properties fo:color="#000000" loext:opacity="100%" fo:letter-spacing="0.106cm" officeooo:rsid="018a4171"/>
    </style:style>
    <style:style style:name="T4" style:family="text">
      <style:text-properties fo:color="#ffffff" loext:opacity="100%" fo:background-color="transparent" loext:char-shading-value="0"/>
    </style:style>
    <style:style style:name="T5" style:family="text">
      <style:text-properties fo:font-variant="small-caps" fo:color="#ffffff" loext:opacity="100%" style:font-name="Century gothic"/>
    </style:style>
    <style:style style:name="T6" style:family="text">
      <style:text-properties fo:font-variant="small-caps" style:font-name="Century gothic"/>
    </style:style>
    <style:style style:name="T7" style:family="text">
      <style:text-properties fo:font-variant="small-caps" fo:color="#ffffff" loext:opacity="100%" style:font-name="Century gothic" fo:letter-spacing="0.106cm" officeooo:rsid="014cbadf"/>
    </style:style>
    <style:style style:name="T8" style:family="text">
      <style:text-properties fo:font-variant="small-caps" fo:color="#ffffff" loext:opacity="100%" style:font-name="Century gothic" fo:letter-spacing="0.106cm" officeooo:rsid="018a4171"/>
    </style:style>
    <style:style style:name="T9" style:family="text">
      <style:text-properties fo:font-variant="small-caps" fo:color="#000000" loext:opacity="100%" style:font-name="Century gothic" fo:letter-spacing="0.106cm" officeooo:rsid="01619f3c"/>
    </style:style>
    <style:style style:name="T10" style:family="text">
      <style:text-properties fo:font-variant="small-caps" fo:color="#000000" loext:opacity="100%" style:font-name="Century gothic" fo:letter-spacing="0.106cm" officeooo:rsid="0185fd7d"/>
    </style:style>
    <style:style style:name="T11" style:family="text">
      <style:text-properties fo:font-variant="small-caps" fo:color="#000000" loext:opacity="100%" style:font-name="Century gothic" fo:letter-spacing="0.106cm" officeooo:rsid="018a4171"/>
    </style:style>
    <style:style style:name="T12" style:family="text">
      <style:text-properties fo:font-variant="small-caps" style:font-name="Century gothic" fo:font-weight="bold" officeooo:rsid="0067f641" style:font-weight-asian="bold" style:font-weight-complex="bold"/>
    </style:style>
    <style:style style:name="T13" style:family="text">
      <style:text-properties fo:font-variant="small-caps" fo:color="#ffffff" loext:opacity="100%" style:font-name="Century gothic" fo:letter-spacing="0.106cm" fo:font-weight="bold" officeooo:rsid="0067f641" style:font-weight-asian="bold" style:font-weight-complex="bold"/>
    </style:style>
    <style:style style:name="T14" style:family="text">
      <style:text-properties fo:font-variant="small-caps" style:font-name="Century gothic" fo:letter-spacing="0.106cm" fo:font-weight="bold" officeooo:rsid="0067f641" style:font-weight-asian="bold" style:font-weight-complex="bold"/>
    </style:style>
    <style:style style:name="T15" style:family="text">
      <style:text-properties fo:font-variant="small-caps" style:font-name="Century gothic" fo:letter-spacing="0.106cm" fo:font-weight="bold" officeooo:rsid="0185fd7d" style:font-weight-asian="bold" style:font-weight-complex="bold"/>
    </style:style>
    <style:style style:name="T16" style:family="text">
      <style:text-properties fo:font-size="14pt" style:font-size-asian="14pt" style:font-size-complex="14pt"/>
    </style:style>
    <style:style style:name="T17" style:family="text">
      <style:text-properties fo:language="es" fo:country="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stroke-linejoin="none" draw:fill="solid" draw:fill-color="#f9f9f9" draw:textarea-horizontal-align="justify" draw:textarea-vertical-align="middle" draw:auto-grow-height="false" fo:min-height="29.861cm" fo:min-width="10.67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linejoin="none" draw:fill="solid" draw:fill-color="#1c1c1c" draw:textarea-horizontal-align="justify" draw:textarea-vertical-align="middle" draw:auto-grow-height="false" fo:min-height="29.977cm" fo:min-width="12.26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ortada"/></text:p>
      <text:p text:style-name="P1"/>
      <text:p text:style-name="P2"><text:span text:style-name="T1"><text:tab/></text:span><text:span text:style-name="T2">Diagra</text:span><text:span text:style-name="T3">ma Base</text:span></text:p>
      <text:p text:style-name="P3"><text:tab/><text:span text:style-name="T4">de D</text:span>atos</text:p>
      <text:p text:style-name="P4"/>
      <text:p text:style-name="P4"/>
      <text:p text:style-name="P4"/>
      <text:p text:style-name="P5"><text:span text:style-name="T5">Por</text:span><text:span text:style-name="T6"> Selam</text:span></text:p>
      <text:p text:style-name="P6"><text:tab/>Be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9"/>
      <text:p text:style-name="P10"><text:tab/></text:p>
      <text:p text:style-name="P11"><text:span text:style-name="T7"><text:tab/></text:span><text:span text:style-name="T8">17</text:span><text:span text:style-name="T9">/</text:span><text:span text:style-name="T10">1</text:span><text:span text:style-name="T11">1</text:span></text:p>
      <text:p text:style-name="P12"><text:span text:style-name="T12"><text:tab/></text:span><text:span text:style-name="T13">20</text:span><text:span text:style-name="T14">2</text:span><text:span text:style-name="T15">5</text:span></text:p>
      <text:p text:style-name="P13"/>
      <text:p text:style-name="P14"/>
      <text:p text:style-name="P15">La base de datos diseñada tiene como objetivo soportar una aplicación web de tipo foro centrado en un único tema. Para ello, se han identificado cuatro entidades principales:</text:p>
      <text:h text:style-name="P16" text:outline-level="3"><text:span text:style-name="Strong_20_Emphasis"><text:span text:style-name="T16">Entidades</text:span></text:span></text:h>
      <text:list text:style-name="L1">
        <text:list-item>
          <text:p text:style-name="P17"><text:span text:style-name="Strong_20_Emphasis"><text:span text:style-name="T16">User</text:span></text:span><text:span text:style-name="T16">: representa a los usuarios registrados.</text:span></text:p>
        </text:list-item>
        <text:list-item>
          <text:p text:style-name="P17"><text:span text:style-name="Strong_20_Emphasis"><text:span text:style-name="T16">Role</text:span></text:span><text:span text:style-name="T16">: define los tipos de rol del sistema (usuario, moderador, administrador).</text:span></text:p>
        </text:list-item>
        <text:list-item>
          <text:p text:style-name="P17"><text:span text:style-name="Strong_20_Emphasis"><text:span text:style-name="T16">Publication</text:span></text:span><text:span text:style-name="T16">: corresponde a las publicaciones creadas por los usuarios.</text:span></text:p>
        </text:list-item>
        <text:list-item>
          <text:p text:style-name="P17"><text:span text:style-name="Strong_20_Emphasis"><text:span text:style-name="T16">Comment</text:span></text:span><text:span text:style-name="T16">: permite añadir comentarios en las publicaciones y gestionar comentarios anidados.</text:span></text:p>
        </text:list-item>
      </text:list>
      <text:h text:style-name="P16" text:outline-level="3"><text:span text:style-name="Strong_20_Emphasis"><text:span text:style-name="T16">Relaciones</text:span></text:span></text:h>
      <text:list text:style-name="L2">
        <text:list-item>
          <text:p text:style-name="P18"><text:span text:style-name="T16">Un </text:span><text:span text:style-name="Strong_20_Emphasis"><text:span text:style-name="T16">usuario</text:span></text:span><text:span text:style-name="T16"> puede tener </text:span><text:span text:style-name="Strong_20_Emphasis"><text:span text:style-name="T16">uno o varios roles</text:span></text:span><text:span text:style-name="T16"> → relación N:M mediante </text:span><text:span text:style-name="Emphasis"><text:span text:style-name="T16">user_has_role</text:span></text:span><text:span text:style-name="T16">.</text:span></text:p>
        </text:list-item>
        <text:list-item>
          <text:p text:style-name="P18"><text:span text:style-name="T16">Un </text:span><text:span text:style-name="Strong_20_Emphasis"><text:span text:style-name="T16">usuario</text:span></text:span><text:span text:style-name="T16"> puede crear </text:span><text:span text:style-name="Strong_20_Emphasis"><text:span text:style-name="T16">muchas publicaciones</text:span></text:span><text:span text:style-name="T16"> → relación 1:N.</text:span></text:p>
        </text:list-item>
        <text:list-item>
          <text:p text:style-name="P18"><text:span text:style-name="T16">Una </text:span><text:span text:style-name="Strong_20_Emphasis"><text:span text:style-name="T16">publicación</text:span></text:span><text:span text:style-name="T16"> puede tener </text:span><text:span text:style-name="Strong_20_Emphasis"><text:span text:style-name="T16">muchos comentarios</text:span></text:span><text:span text:style-name="T16"> → relación 1:N.</text:span></text:p>
        </text:list-item>
        <text:list-item>
          <text:p text:style-name="P18"><text:span text:style-name="T16">Un </text:span><text:span text:style-name="Strong_20_Emphasis"><text:span text:style-name="T16">usuario</text:span></text:span><text:span text:style-name="T16"> puede crear </text:span><text:span text:style-name="Strong_20_Emphasis"><text:span text:style-name="T16">muchos comentarios</text:span></text:span><text:span text:style-name="T16"> → relación 1:N.</text:span></text:p>
        </text:list-item>
        <text:list-item>
          <text:p text:style-name="P18"><text:span text:style-name="T16">Un </text:span><text:span text:style-name="Strong_20_Emphasis"><text:span text:style-name="T16">comentario</text:span></text:span><text:span text:style-name="T16"> puede ser respuesta a otro comentario → relación recursiva 1:N.</text:span></text:p>
        </text:list-item>
      </text:list>
      <text:h text:style-name="P16" text:outline-level="3"><text:span text:style-name="Strong_20_Emphasis"><text:span text:style-name="T16">Diagrama E/R (descripción textual)</text:span></text:span></text:h>
      <text:list text:style-name="L3">
        <text:list-item>
          <text:p text:style-name="P19"><text:span text:style-name="Strong_20_Emphasis"><text:span text:style-name="T16">User</text:span></text:span><text:span text:style-name="T16"> (1) —— (N) </text:span><text:span text:style-name="Strong_20_Emphasis"><text:span text:style-name="T16">Publication</text:span></text:span></text:p>
        </text:list-item>
        <text:list-item>
          <text:p text:style-name="P19"><text:span text:style-name="Strong_20_Emphasis"><text:span text:style-name="T16">User</text:span></text:span><text:span text:style-name="T16"> (1) —— (N) </text:span><text:span text:style-name="Strong_20_Emphasis"><text:span text:style-name="T16">Comment</text:span></text:span></text:p>
        </text:list-item>
        <text:list-item>
          <text:p text:style-name="P19"><text:span text:style-name="Strong_20_Emphasis"><text:span text:style-name="T16">Publication</text:span></text:span><text:span text:style-name="T16"> (1) —— (N) </text:span><text:span text:style-name="Strong_20_Emphasis"><text:span text:style-name="T16">Comment</text:span></text:span></text:p>
        </text:list-item>
        <text:list-item>
          <text:p text:style-name="P19"><text:span text:style-name="Strong_20_Emphasis"><text:span text:style-name="T16">Role</text:span></text:span><text:span text:style-name="T16"> (1) —— (N) </text:span><text:span text:style-name="Strong_20_Emphasis"><text:span text:style-name="T16">user_has_role</text:span></text:span><text:span text:style-name="T16"> —— (N) </text:span><text:span text:style-name="Strong_20_Emphasis"><text:span text:style-name="T16">User</text:span></text:span></text:p>
        </text:list-item>
        <text:list-item>
          <text:p text:style-name="P19"><text:span text:style-name="Strong_20_Emphasis"><text:span text:style-name="T16">Comment</text:span></text:span><text:span text:style-name="T16"> (1) —— (N) </text:span><text:span text:style-name="Strong_20_Emphasis"><text:span text:style-name="T16">Comment</text:span></text:span><text:span text:style-name="T16"> (comentarios anidados)</text:span></text:p>
        </text:list-item>
      </text:list>
      <text:p text:style-name="P14"><text:span text:style-name="T17"/></text:p>
      <text:p text:style-name="P20">Pensé en la posibilidad de meter una entidad adicional, que definiera un tema general en la que se harían posts, pero he decidido simplificarlo por ahora. Quizá lo cambie en el futuro.</text:p>
      <text:p text:style-name="P21">Script SQL</text:p>
      <text:p text:style-name="P22">CREATE TABLE user (</text:p>
      <text:p text:style-name="P22"><text:s text:c="2"/>id BIGINT PRIMARY KEY AUTO_INCREMENT,</text:p>
      <text:p text:style-name="P22"><text:s text:c="2"/>email VARCHAR(255),</text:p>
      <text:p text:style-name="P22"><text:s text:c="2"/>name VARCHAR(255),</text:p>
      <text:p text:style-name="P22"><text:s text:c="2"/>surname VARCHAR(255),</text:p>
      <text:p text:style-name="P22"><text:s text:c="2"/>password VARCHAR(255),</text:p>
      <text:p text:style-name="P22"><text:s text:c="2"/>date_registered DATETIME</text:p>
      <text:p text:style-name="P22">);</text:p>
      <text:p text:style-name="P22"/>
      <text:p text:style-name="P22">CREATE TABLE role (</text:p>
      <text:p text:style-name="P22"><text:s text:c="2"/>id BIGINT PRIMARY KEY AUTO_INCREMENT,</text:p>
      <text:p text:style-name="P22"><text:s text:c="2"/>role_name VARCHAR(100)</text:p>
      <text:p text:style-name="P22">);</text:p>
      <text:p text:style-name="P22"/>
      <text:p text:style-name="P22">CREATE TABLE user_has_role (</text:p>
      <text:p text:style-name="P22"><text:s text:c="2"/>id_user BIGINT,</text:p>
      <text:p text:style-name="P22"><text:s text:c="2"/>id_role BIGINT,</text:p>
      <text:p text:style-name="P22"><text:s text:c="2"/>FOREIGN KEY (id_user) REFERENCES user(id),</text:p>
      <text:p text:style-name="P22"><text:s text:c="2"/>FOREIGN KEY (id_role) REFERENCES role(id)</text:p>
      <text:p text:style-name="P22">);</text:p>
      <text:p text:style-name="P22"/>
      <text:p text:style-name="P22">CREATE TABLE publication (</text:p>
      <text:p text:style-name="P22"><text:s text:c="2"/>id BIGINT PRIMARY KEY AUTO_INCREMENT,</text:p>
      <text:p text:style-name="P22"><text:s text:c="2"/>id_user BIGINT,</text:p>
      <text:p text:style-name="P22"><text:s text:c="2"/>title VARCHAR(255),</text:p>
      <text:p text:style-name="P22"><text:s text:c="2"/>content TEXT,</text:p>
      <text:p text:style-name="P22"><text:s text:c="2"/>date_creation DATETIME,</text:p>
      <text:p text:style-name="P22"><text:s text:c="2"/>date_edited DATETIME,</text:p>
      <text:p text:style-name="P22"><text:s text:c="2"/>FOREIGN KEY (id_user) REFERENCES user(id)</text:p>
      <text:p text:style-name="P22">);</text:p>
      <text:p text:style-name="P22"/>
      <text:p text:style-name="P22">CREATE TABLE comment (</text:p>
      <text:p text:style-name="P22"><text:s text:c="2"/>id BIGINT PRIMARY KEY AUTO_INCREMENT,</text:p>
      <text:p text:style-name="P22"><text:s text:c="2"/>id_publication BIGINT,</text:p>
      <text:p text:style-name="P22"><text:s text:c="2"/>id_user BIGINT,</text:p>
      <text:p text:style-name="P22"><text:s text:c="2"/>id_comment_parent BIGINT NULL,</text:p>
      <text:p text:style-name="P22"><text:s text:c="2"/>content TEXT,</text:p>
      <text:p text:style-name="P22"><text:s text:c="2"/>date_creation DATETIME,</text:p>
      <text:p text:style-name="P22"><text:s text:c="2"/>date_edited DATETIME,</text:p>
      <text:p text:style-name="P22"><text:s text:c="2"/>FOREIGN KEY (id_publication) REFERENCES publication(id),</text:p>
      <text:p text:style-name="P22"><text:s text:c="2"/>FOREIGN KEY (id_user) REFERENCES user(id),</text:p>
      <text:p text:style-name="P22"><text:s text:c="2"/>FOREIGN KEY (id_comment_parent) REFERENCES comment(id)</text:p>
      <text:p text:style-name="P22">);</text:p>
      <text:p text:style-name="P22"><text:soft-page-break/></text:p>
      <text:p text:style-name="P23"><draw:frame draw:style-name="fr1" draw:name="Imagen1" text:anchor-type="char" svg:x="0cm" svg:y="1.353cm" svg:width="17cm" svg:height="8.431cm" draw:z-index="2"><draw:image xlink:href="Pictures/10000001000004DC00000269915AA8BE.png" xlink:type="simple" xlink:show="embed" xlink:actuate="onLoad" draw:mime-type="image/png"/></draw:frame>ESQUEM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roman" style:font-pitch="variable"/>
    <style:font-face style:name="Century gothic" svg:font-family="'Century gothic'"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Roboto" svg:font-family="Robot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style:contextual-spacing="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stilo_20_de_20_dibujo_20_predeterminado" style:display-name="Estilo de dibujo 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Roboto" style:font-family-complex="Roboto"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Roboto" style:font-family-complex="Roboto"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Roboto" style:font-family-complex="Roboto"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Roboto" style:font-family-complex="Roboto"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Roboto" style:font-family-complex="Roboto"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Roboto" style:font-family-complex="Roboto"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Roboto" style:font-family-complex="Roboto"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Roboto" style:font-family-complex="Roboto"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Roboto" style:font-family-complex="Roboto"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Roboto" style:font-family-complex="Roboto"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Roboto" style:font-family-complex="Roboto"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Roboto" style:font-family-complex="Roboto"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Roboto" style:font-family-complex="Roboto"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1" style:display-name="TITLE_ONLY~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Roboto" style:font-family-complex="Roboto"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Roboto" style:font-family-complex="Roboto"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Roboto" style:font-family-complex="Roboto"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Roboto" style:font-family-complex="Roboto"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Roboto" style:font-family-complex="Roboto" style:font-family-generic-complex="system" style:font-pitch-complex="variable" style:font-size-complex="12pt"/>
    </style:style>
    <style:style style:name="TITLE_5f_ONLY_7e_LT_7e_Hintergrund" style:display-name="TITLE_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Roboto" style:font-family-complex="Roboto"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Roboto" style:font-family-complex="Roboto"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Roboto" style:font-family-complex="Roboto"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Roboto" style:font-family-complex="Roboto"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Roboto" style:font-family-complex="Roboto"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Roboto" style:font-family-complex="Roboto" style:font-family-generic-complex="system" style:font-pitch-complex="variable" style:font-size-complex="12pt"/>
    </style:style>
    <style:style style:name="TITLE_5f_AND_5f_TWO_5f_COLUMNS_7e_LT_7e_Hintergrund" style:display-name="TITLE_AND_TWO_COLUMN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Roboto" style:font-family-complex="Roboto"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8.5cm" style:type="center"/>
          <style:tab-stop style:position="16.801cm" style:type="right"/>
          <style:tab-stop style:position="16.907cm"/>
        </style:tab-stops>
      </style:paragraph-properties>
      <style:text-properties fo:language="es" fo:country="ES" officeooo:rsid="00131be6" officeooo:paragraph-rsid="00131be6"/>
    </style:style>
    <style:style style:name="MP2" style:family="paragraph">
      <loext:graphic-properties draw:fill="solid" draw:fill-color="#1c1c1c"/>
      <style:paragraph-properties fo:text-align="center"/>
    </style:style>
    <style:style style:name="MP3" style:family="paragraph">
      <loext:graphic-properties draw:fill="solid" draw:fill-color="#f9f9f9"/>
      <style:paragraph-properties fo:text-align="center"/>
    </style:style>
    <style:style style:name="MP4" style:family="paragraph" style:parent-style-name="Footer">
      <style:paragraph-properties>
        <style:tab-stops>
          <style:tab-stop style:position="8.5cm" style:type="center"/>
          <style:tab-stop style:position="16.999cm" style:type="right"/>
          <style:tab-stop style:position="17cm" style:type="right"/>
        </style:tab-stops>
      </style:paragraph-properties>
      <style:text-properties fo:language="es" fo:country="ES" officeooo:paragraph-rsid="00b116f8"/>
    </style:style>
    <style:style style:name="MP5" style:family="paragraph" style:parent-style-name="Footer">
      <style:paragraph-properties>
        <style:tab-stops>
          <style:tab-stop style:position="8.5cm" style:type="center"/>
          <style:tab-stop style:position="16.999cm" style:type="right"/>
          <style:tab-stop style:position="17cm" style:type="right"/>
        </style:tab-stops>
      </style:paragraph-properties>
      <style:text-properties fo:language="es" fo:country="ES"/>
    </style:style>
    <style:style style:name="MT1" style:family="text">
      <style:text-properties style:font-name="Caladea"/>
    </style:style>
    <style:style style:name="Mgr1" style:family="graphic">
      <style:graphic-properties draw:stroke="none" draw:stroke-linejoin="none" draw:fill="solid" draw:fill-color="#1c1c1c" draw:textarea-horizontal-align="justify" draw:textarea-vertical-align="middle" draw:auto-grow-height="false" fo:min-height="29.977cm" fo:min-width="12.26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stroke-linejoin="none" draw:fill="solid" draw:fill-color="#f9f9f9" draw:textarea-horizontal-align="justify" draw:textarea-vertical-align="middle" draw:auto-grow-height="false" fo:min-height="29.861cm" fo:min-width="10.67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span text:style-name="MT1">Selam Belkharroub Jerez<text:tab/><text:tab/></text:span><text:span text:style-name="MT1"><text:date style:data-style-name="N37" text:date-value="2025-11-17T12:09:16.718544778">17/11/25</text:date></text:span><text:span text:style-name="MT1"><text:tab/></text:span><text:tab/></text:p>
      </style:header>
      <style:header-first>
        <text:p text:style-name="MP1"><draw:custom-shape text:anchor-type="paragraph" draw:z-index="0" draw:name="Forma 1" draw:style-name="Mgr1" draw:text-style-name="MP2" svg:width="12.265cm" svg:height="29.978cm" svg:x="-4.036cm" svg:y="-2cm"><text:p/><draw:enhanced-geometry svg:viewBox="0 0 21600 21600" draw:mirror-horizontal="false" draw:mirror-vertical="false" draw:type="rectangle" draw:enhanced-path="M 0 0 L 21600 0 21600 21600 0 21600 0 0 Z N"/></draw:custom-shape><draw:custom-shape text:anchor-type="paragraph" draw:z-index="1" draw:name="Forma 2" draw:style-name="Mgr2" draw:text-style-name="MP3" svg:width="10.674cm" svg:height="29.862cm" svg:x="8.327cm" svg:y="-2cm"><text:p/><draw:enhanced-geometry svg:viewBox="0 0 21600 21600" draw:mirror-horizontal="false" draw:mirror-vertical="false" draw:type="rectangle" draw:enhanced-path="M 0 0 L 21600 0 21600 21600 0 21600 0 0 Z N"/></draw:custom-shape><text:span text:style-name="MT1"><text:tab/></text:span><text:tab/></text:p>
      </style:header-first>
      <style:footer>
        <text:p text:style-name="MP4"><text:tab/><text:page-number text:select-page="current">2</text:page-number>-<text:page-count>4</text:page-count></text:p>
      </style:footer>
      <style:footer-first>
        <text:p text:style-name="MP5"><text:tab/></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9-16T09:49:44.741000000</meta:creation-date>
    <dc:date>2025-11-17T12:09:16.532705300</dc:date>
    <meta:editing-duration>PT17H53M44S</meta:editing-duration>
    <meta:editing-cycles>297</meta:editing-cycles>
    <meta:generator>LibreOffice/25.2.6.2$Windows_X86_64 LibreOffice_project/729c5bfe710f5eb71ed3bbde9e06a6065e9c6c5d</meta:generator>
    <meta:document-statistic meta:table-count="0" meta:image-count="1" meta:object-count="0" meta:page-count="4" meta:paragraph-count="72" meta:word-count="324" meta:character-count="2298" meta:non-whitespace-character-count="1978"/>
  </office:meta>
</office:document-meta>
</file>