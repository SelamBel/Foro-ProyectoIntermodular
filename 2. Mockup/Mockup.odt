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DD000003A9229C673D.png" manifest:media-type="image/png"/>
  <manifest:file-entry manifest:full-path="Pictures/10000001000007750000043802FFAC81.png" manifest:media-type="image/png"/>
  <manifest:file-entry manifest:full-path="Pictures/1000000100000293000003BBDCF8B6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entury gothic" svg:font-family="'Century gothic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31be6" officeooo:paragraph-rsid="00131be6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start" style:justify-single-word="false" fo:text-indent="0cm" style:auto-text-indent="false" style:page-number="auto" fo:background-color="transparent">
        <style:tab-stops>
          <style:tab-stop style:position="7.601cm" style:type="center"/>
        </style:tab-stops>
      </style:paragraph-properties>
      <style:text-properties fo:font-variant="small-caps" fo:color="#ffffff" loext:opacity="100%" style:font-name="Century gothic" fo:font-size="54pt" fo:letter-spacing="normal" fo:language="es" fo:country="ES" officeooo:rsid="01523226" officeooo:paragraph-rsid="01523226" style:font-size-asian="47.25pt" style:font-size-complex="5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714cm" style:type="center"/>
        </style:tab-stops>
      </style:paragraph-properties>
      <style:text-properties fo:font-variant="small-caps" style:font-name="Century gothic" fo:font-size="13pt" fo:language="es" fo:country="ES" officeooo:rsid="0064e2df" officeooo:paragraph-rsid="0064e2df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714cm" style:type="center"/>
        </style:tab-stops>
      </style:paragraph-properties>
      <style:text-properties fo:font-size="16pt" fo:language="es" fo:country="ES" fo:font-weight="bold" officeooo:rsid="0064e2df" officeooo:paragraph-rsid="006ff29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.296cm"/>
          <style:tab-stop style:position="8.798cm"/>
          <style:tab-stop style:position="8.983cm" style:type="center"/>
        </style:tab-stops>
      </style:paragraph-properties>
      <style:text-properties fo:font-variant="small-caps" style:font-name="Century gothic" fo:font-size="16pt" fo:language="es" fo:country="ES" fo:font-weight="bold" officeooo:rsid="0064e2df" officeooo:paragraph-rsid="006ff29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8.714cm" style:type="center"/>
        </style:tab-stops>
      </style:paragraph-properties>
      <style:text-properties fo:font-variant="small-caps" style:font-name="Century gothic" fo:font-size="16pt" fo:language="es" fo:country="ES" fo:font-weight="bold" officeooo:rsid="0064e2df" officeooo:paragraph-rsid="0064e2df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101cm" style:contextual-spacing="false" fo:text-align="start" style:justify-single-word="false">
        <style:tab-stops>
          <style:tab-stop style:position="6.8cm"/>
        </style:tab-stops>
      </style:paragraph-properties>
      <style:text-properties fo:font-variant="small-caps" fo:color="#c9211e" loext:opacity="100%" style:font-name="Century gothic" fo:font-size="16pt" fo:language="es" fo:country="ES" fo:font-weight="bold" officeooo:rsid="007360cd" officeooo:paragraph-rsid="007360c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8.184cm" style:type="center"/>
        </style:tab-stops>
      </style:paragraph-properties>
      <style:text-properties fo:font-variant="small-caps" style:font-name="Century gothic" fo:font-size="16pt" fo:language="es" fo:country="ES" fo:font-weight="bold" officeooo:rsid="0064e2df" officeooo:paragraph-rsid="0067f64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7.396cm"/>
        </style:tab-stops>
      </style:paragraph-properties>
      <style:text-properties fo:font-variant="small-caps" style:font-name="Century gothic" fo:font-size="16pt" fo:language="es" fo:country="ES" fo:font-weight="bold" officeooo:rsid="0066d0a8" officeooo:paragraph-rsid="015b665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396cm"/>
        </style:tab-stops>
      </style:paragraph-properties>
      <style:text-properties fo:font-size="16pt" fo:language="es" fo:country="ES" fo:font-weight="bold" officeooo:rsid="0066d0a8" officeooo:paragraph-rsid="015b665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502cm"/>
          <style:tab-stop style:position="7.594cm"/>
        </style:tab-stops>
      </style:paragraph-properties>
      <style:text-properties fo:font-size="16pt" fo:language="es" fo:country="ES" officeooo:rsid="0066d0a8" officeooo:paragraph-rsid="0069de60" style:font-size-asian="14pt" style:font-size-complex="16pt"/>
    </style:style>
    <style:style style:name="P12" style:family="paragraph" style:parent-style-name="Standard">
      <style:text-properties style:font-name="Caladea" fo:font-size="10pt" fo:language="es" fo:country="ES" officeooo:rsid="017fbb91" officeooo:paragraph-rsid="016475cb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aladea" fo:font-size="42pt" fo:language="es" fo:country="ES" officeooo:rsid="01876b88" officeooo:paragraph-rsid="01876b88" style:font-size-asian="42pt" style:font-size-complex="42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Caladea" fo:font-size="15pt" fo:language="es" fo:country="ES" fo:font-weight="bold" officeooo:rsid="018a74a8" officeooo:paragraph-rsid="018a74a8" style:font-size-asian="15pt" style:font-weight-asian="bold" style:font-size-complex="15pt" style:font-weight-complex="bold"/>
    </style:style>
    <style:style style:name="P15" style:family="paragraph" style:parent-style-name="Text_20_body">
      <style:text-properties style:font-name="Caladea" fo:font-size="14pt" fo:language="es" fo:country="ES" style:text-underline-style="solid" style:text-underline-width="auto" style:text-underline-color="font-color" officeooo:rsid="01876a97" officeooo:paragraph-rsid="01876a97" style:font-size-asian="12.25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Caladea" fo:font-size="14pt" fo:language="es" fo:country="ES" fo:font-weight="bold" officeooo:rsid="018a74a8" officeooo:paragraph-rsid="018a74a8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Caladea" fo:font-size="14pt" fo:language="es" fo:country="ES" officeooo:rsid="018a74a8" officeooo:paragraph-rsid="018a74a8" style:font-size-asian="12.25pt" style:font-size-complex="14pt"/>
    </style:style>
    <style:style style:name="P18" style:family="paragraph" style:parent-style-name="Text_20_body">
      <style:paragraph-properties fo:text-align="center" style:justify-single-word="false" fo:break-before="page"/>
      <style:text-properties style:font-name="Caladea" fo:font-size="14pt" fo:language="es" fo:country="ES" officeooo:rsid="018a74a8" officeooo:paragraph-rsid="018a74a8" style:font-size-asian="12.25pt" style:font-size-complex="14pt"/>
    </style:style>
    <style:style style:name="P19" style:family="paragraph">
      <loext:graphic-properties draw:fill="solid" draw:fill-color="#f9f9f9"/>
      <style:paragraph-properties fo:text-align="center"/>
    </style:style>
    <style:style style:name="P20" style:family="paragraph">
      <loext:graphic-properties draw:fill="solid" draw:fill-color="#1c1c1c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letter-spacing="0.106cm" officeooo:rsid="018a74a8"/>
    </style:style>
    <style:style style:name="T3" style:family="text">
      <style:text-properties fo:color="#000000" loext:opacity="100%" fo:letter-spacing="0.106cm" officeooo:rsid="018a74a8"/>
    </style:style>
    <style:style style:name="T4" style:family="text">
      <style:text-properties fo:font-variant="small-caps" fo:color="#ffffff" loext:opacity="100%" style:font-name="Century gothic"/>
    </style:style>
    <style:style style:name="T5" style:family="text">
      <style:text-properties fo:font-variant="small-caps" style:font-name="Century gothic"/>
    </style:style>
    <style:style style:name="T6" style:family="text">
      <style:text-properties fo:font-variant="small-caps" fo:color="#ffffff" loext:opacity="100%" style:font-name="Century gothic" fo:letter-spacing="0.106cm" officeooo:rsid="014cbadf"/>
    </style:style>
    <style:style style:name="T7" style:family="text">
      <style:text-properties fo:font-variant="small-caps" fo:color="#ffffff" loext:opacity="100%" style:font-name="Century gothic" fo:letter-spacing="0.106cm" officeooo:rsid="018a74a8"/>
    </style:style>
    <style:style style:name="T8" style:family="text">
      <style:text-properties fo:font-variant="small-caps" fo:color="#000000" loext:opacity="100%" style:font-name="Century gothic" fo:letter-spacing="0.106cm" officeooo:rsid="01619f3c"/>
    </style:style>
    <style:style style:name="T9" style:family="text">
      <style:text-properties fo:font-variant="small-caps" fo:color="#000000" loext:opacity="100%" style:font-name="Century gothic" fo:letter-spacing="0.106cm" officeooo:rsid="0185fd7d"/>
    </style:style>
    <style:style style:name="T10" style:family="text">
      <style:text-properties fo:font-variant="small-caps" style:font-name="Century gothic" fo:font-weight="bold" officeooo:rsid="0067f641" style:font-weight-asian="bold" style:font-weight-complex="bold"/>
    </style:style>
    <style:style style:name="T11" style:family="text">
      <style:text-properties fo:font-variant="small-caps" fo:color="#ffffff" loext:opacity="100%" style:font-name="Century gothic" fo:letter-spacing="0.106cm" fo:font-weight="bold" officeooo:rsid="0067f641" style:font-weight-asian="bold" style:font-weight-complex="bold"/>
    </style:style>
    <style:style style:name="T12" style:family="text">
      <style:text-properties fo:font-variant="small-caps" style:font-name="Century gothic" fo:letter-spacing="0.106cm" fo:font-weight="bold" officeooo:rsid="0067f641" style:font-weight-asian="bold" style:font-weight-complex="bold"/>
    </style:style>
    <style:style style:name="T13" style:family="text">
      <style:text-properties fo:font-variant="small-caps" style:font-name="Century gothic" fo:letter-spacing="0.106cm" fo:font-weight="bold" officeooo:rsid="0185fd7d" style:font-weight-asian="bold" style:font-weight-complex="bold"/>
    </style:style>
    <style:style style:name="T14" style:family="text">
      <style:text-properties fo:font-size="14pt" officeooo:rsid="018a74a8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linejoin="none" draw:fill="solid" draw:fill-color="#f9f9f9" draw:textarea-horizontal-align="justify" draw:textarea-vertical-align="middle" draw:auto-grow-height="false" fo:min-height="29.861cm" fo:min-width="10.6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linejoin="none" draw:fill="solid" draw:fill-color="#1c1c1c" draw:textarea-horizontal-align="justify" draw:textarea-vertical-align="middle" draw:auto-grow-height="false" fo:min-height="29.977cm" fo:min-width="12.26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ortada"/></text:p>
      <text:p text:style-name="P1"/>
      <text:p text:style-name="P2"><text:span text:style-name="T1"><text:tab/></text:span><text:span text:style-name="T2">Moc</text:span><text:span text:style-name="T3">kup</text:span></text:p>
      <text:p text:style-name="P3"/>
      <text:p text:style-name="P3"/>
      <text:p text:style-name="P3"/>
      <text:p text:style-name="P4"><text:span text:style-name="T4">Por</text:span><text:span text:style-name="T5"> Selam</text:span></text:p>
      <text:p text:style-name="P5"><text:tab/>Bel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/text:p>
      <text:p text:style-name="P8"/>
      <text:p text:style-name="P9"><text:tab/></text:p>
      <text:p text:style-name="P10"><text:span text:style-name="T6"><text:tab/></text:span><text:span text:style-name="T7">29</text:span><text:span text:style-name="T8">/</text:span><text:span text:style-name="T9">10</text:span></text:p>
      <text:p text:style-name="P11"><text:span text:style-name="T10"><text:tab/></text:span><text:span text:style-name="T11">20</text:span><text:span text:style-name="T12">2</text:span><text:span text:style-name="T13">5</text:span></text:p>
      <text:p text:style-name="P12"/>
      <text:p text:style-name="P13"/>
      <text:p text:style-name="P14">Versión PC</text:p>
      <text:p text:style-name="P15"><draw:frame draw:style-name="fr1" draw:name="Imagen1" text:anchor-type="char" svg:x="0cm" svg:y="0.339cm" svg:width="17cm" svg:height="9.617cm" draw:z-index="2"><draw:image xlink:href="Pictures/10000001000007750000043802FFAC81.png" xlink:type="simple" xlink:show="embed" xlink:actuate="onLoad" draw:mime-type="image/png"/></draw:frame></text:p>
      <text:p text:style-name="P16">Versión Tablet</text:p>
      <text:p text:style-name="P17"><draw:frame draw:style-name="fr1" draw:name="Imagen2" text:anchor-type="char" svg:x="1.321cm" svg:y="0cm" svg:width="14.624cm" svg:height="11.007cm" draw:z-index="3"><draw:image xlink:href="Pictures/10000001000004DD000003A9229C673D.png" xlink:type="simple" xlink:show="embed" xlink:actuate="onLoad" draw:mime-type="image/png"/></draw:frame></text:p>
      <text:p text:style-name="P18"><text:span text:style-name="Strong_20_Emphasis">Versión Móvil</text:span></text:p>
      <text:p text:style-name="P17"><draw:frame draw:style-name="fr1" draw:name="Imagen3" text:anchor-type="char" svg:x="1.085cm" svg:y="0.284cm" svg:width="15.406cm" svg:height="22.326cm" draw:z-index="4"><draw:image xlink:href="Pictures/1000000100000293000003BBDCF8B601.png" xlink:type="simple" xlink:show="embed" xlink:actuate="onLoad" draw:mime-type="image/png"/></draw:frame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entury gothic" svg:font-family="'Century gothic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Roboto" style:font-family-complex="Roboto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Roboto" style:font-family-complex="Roboto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1" style:display-name="TITLE_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6.801cm" style:type="right"/>
          <style:tab-stop style:position="16.907cm"/>
        </style:tab-stops>
      </style:paragraph-properties>
      <style:text-properties fo:language="es" fo:country="ES" officeooo:rsid="00131be6" officeooo:paragraph-rsid="00131be6"/>
    </style:style>
    <style:style style:name="MP2" style:family="paragraph">
      <loext:graphic-properties draw:fill="solid" draw:fill-color="#1c1c1c"/>
      <style:paragraph-properties fo:text-align="center"/>
    </style:style>
    <style:style style:name="MP3" style:family="paragraph">
      <loext:graphic-properties draw:fill="solid" draw:fill-color="#f9f9f9"/>
      <style:paragraph-properties fo:text-align="center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fo:language="es" fo:country="ES" officeooo:paragraph-rsid="00b116f8"/>
    </style:style>
    <style:style style:name="MP5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fo:language="es" fo:country="ES"/>
    </style:style>
    <style:style style:name="MT1" style:family="text">
      <style:text-properties style:font-name="Caladea"/>
    </style:style>
    <style:style style:name="Mgr1" style:family="graphic">
      <style:graphic-properties draw:stroke="none" draw:stroke-linejoin="none" draw:fill="solid" draw:fill-color="#1c1c1c" draw:textarea-horizontal-align="justify" draw:textarea-vertical-align="middle" draw:auto-grow-height="false" fo:min-height="29.977cm" fo:min-width="12.26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stroke-linejoin="none" draw:fill="solid" draw:fill-color="#f9f9f9" draw:textarea-horizontal-align="justify" draw:textarea-vertical-align="middle" draw:auto-grow-height="false" fo:min-height="29.861cm" fo:min-width="10.6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Selam Belkharroub Jerez<text:tab/><text:tab/></text:span><text:span text:style-name="MT1"><text:date style:data-style-name="N37" text:date-value="2025-10-29T10:39:35.582510302">29/10/25</text:date></text:span><text:span text:style-name="MT1"><text:tab/></text:span><text:tab/></text:p>
      </style:header>
      <style:header-first>
        <text:p text:style-name="MP1"><draw:custom-shape text:anchor-type="paragraph" draw:z-index="0" draw:name="Forma 1" draw:style-name="Mgr1" draw:text-style-name="MP2" svg:width="12.265cm" svg:height="29.978cm" svg:x="-4.036cm" svg:y="-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a 2" draw:style-name="Mgr2" draw:text-style-name="MP3" svg:width="10.674cm" svg:height="29.862cm" svg:x="8.327cm" svg:y="-2cm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tab/></text:p>
      </style:header-first>
      <style:footer>
        <text:p text:style-name="MP4"><text:tab/><text:page-number text:select-page="current">3</text:page-number>-<text:page-count>3</text:page-count></text:p>
      </style:footer>
      <style:footer-first>
        <text:p text:style-name="MP5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16T09:49:44.741000000</meta:creation-date>
    <dc:date>2025-10-29T10:38:47.749837100</dc:date>
    <meta:editing-duration>PT17H48M44S</meta:editing-duration>
    <meta:editing-cycles>297</meta:editing-cycles>
    <meta:generator>LibreOffice/25.8.2.2$Windows_X86_64 LibreOffice_project/d401f2107ccab8f924a8e2df40f573aab7605b6f</meta:generator>
    <meta:document-statistic meta:table-count="0" meta:image-count="3" meta:object-count="0" meta:page-count="3" meta:paragraph-count="14" meta:word-count="17" meta:character-count="113" meta:non-whitespace-character-count="93"/>
  </office:meta>
</office:document-meta>
</file>