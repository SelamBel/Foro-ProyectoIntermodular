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entury gothic" svg:font-family="'Century gothic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31be6" officeooo:paragraph-rsid="00131be6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false" fo:text-align="start" style:justify-single-word="false" fo:text-indent="0cm" style:auto-text-indent="false" style:page-number="auto" fo:background-color="transparent">
        <style:tab-stops>
          <style:tab-stop style:position="8.29cm" style:type="center"/>
        </style:tab-stops>
      </style:paragraph-properties>
      <style:text-properties fo:font-variant="small-caps" fo:color="#ffffff" loext:opacity="100%" style:font-name="Century gothic" fo:font-size="54pt" fo:letter-spacing="normal" fo:language="es" fo:country="ES" officeooo:rsid="01523226" officeooo:paragraph-rsid="01523226" style:font-size-asian="47.25pt" style:font-size-complex="54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start" style:justify-single-word="false" fo:text-indent="0cm" style:auto-text-indent="false" fo:background-color="transparent">
        <style:tab-stops>
          <style:tab-stop style:position="7.691cm" style:type="center"/>
        </style:tab-stops>
      </style:paragraph-properties>
      <style:text-properties fo:font-variant="small-caps" fo:color="#ffffff" loext:opacity="100%" style:font-name="Century gothic" fo:font-size="54pt" fo:letter-spacing="0.106cm" fo:language="es" fo:country="ES" officeooo:rsid="0184be41" officeooo:paragraph-rsid="0184be41" style:font-size-asian="47.25pt" style:font-size-complex="54pt"/>
    </style:style>
    <style:style style:name="P4" style:family="paragraph" style:parent-style-name="Standard">
      <style:paragraph-properties fo:text-align="center" style:justify-single-word="false">
        <style:tab-stops>
          <style:tab-stop style:position="8.714cm" style:type="center"/>
        </style:tab-stops>
      </style:paragraph-properties>
      <style:text-properties fo:font-variant="small-caps" style:font-name="Century gothic" fo:font-size="13pt" fo:language="es" fo:country="ES" officeooo:rsid="0064e2df" officeooo:paragraph-rsid="0064e2df" style:font-size-asian="11.3500003814697pt" style:font-size-complex="13pt"/>
    </style:style>
    <style:style style:name="P5" style:family="paragraph" style:parent-style-name="Standard">
      <style:paragraph-properties fo:text-align="center" style:justify-single-word="false">
        <style:tab-stops>
          <style:tab-stop style:position="8.714cm" style:type="center"/>
        </style:tab-stops>
      </style:paragraph-properties>
      <style:text-properties fo:font-size="16pt" fo:language="es" fo:country="ES" fo:font-weight="bold" officeooo:rsid="0064e2df" officeooo:paragraph-rsid="006ff292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8.296cm"/>
          <style:tab-stop style:position="8.798cm"/>
          <style:tab-stop style:position="8.983cm" style:type="center"/>
        </style:tab-stops>
      </style:paragraph-properties>
      <style:text-properties fo:font-variant="small-caps" style:font-name="Century gothic" fo:font-size="16pt" fo:language="es" fo:country="ES" fo:font-weight="bold" officeooo:rsid="0064e2df" officeooo:paragraph-rsid="006ff292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8.714cm" style:type="center"/>
        </style:tab-stops>
      </style:paragraph-properties>
      <style:text-properties fo:font-variant="small-caps" style:font-name="Century gothic" fo:font-size="16pt" fo:language="es" fo:country="ES" fo:font-weight="bold" officeooo:rsid="0064e2df" officeooo:paragraph-rsid="0064e2df" style:font-size-asian="14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.101cm" style:contextual-spacing="false" fo:text-align="start" style:justify-single-word="false">
        <style:tab-stops>
          <style:tab-stop style:position="6.8cm"/>
        </style:tab-stops>
      </style:paragraph-properties>
      <style:text-properties fo:font-variant="small-caps" fo:color="#c9211e" loext:opacity="100%" style:font-name="Century gothic" fo:font-size="16pt" fo:language="es" fo:country="ES" fo:font-weight="bold" officeooo:rsid="007360cd" officeooo:paragraph-rsid="007360cd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8.184cm" style:type="center"/>
        </style:tab-stops>
      </style:paragraph-properties>
      <style:text-properties fo:font-variant="small-caps" style:font-name="Century gothic" fo:font-size="16pt" fo:language="es" fo:country="ES" fo:font-weight="bold" officeooo:rsid="0064e2df" officeooo:paragraph-rsid="0067f641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7.396cm"/>
        </style:tab-stops>
      </style:paragraph-properties>
      <style:text-properties fo:font-variant="small-caps" style:font-name="Century gothic" fo:font-size="16pt" fo:language="es" fo:country="ES" fo:font-weight="bold" officeooo:rsid="0066d0a8" officeooo:paragraph-rsid="015b665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7.396cm"/>
        </style:tab-stops>
      </style:paragraph-properties>
      <style:text-properties fo:font-size="16pt" fo:language="es" fo:country="ES" fo:font-weight="bold" officeooo:rsid="0066d0a8" officeooo:paragraph-rsid="015b6650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7.502cm"/>
          <style:tab-stop style:position="7.594cm"/>
        </style:tab-stops>
      </style:paragraph-properties>
      <style:text-properties fo:font-size="16pt" fo:language="es" fo:country="ES" officeooo:rsid="0066d0a8" officeooo:paragraph-rsid="0069de60" style:font-size-asian="14pt" style:font-size-complex="16pt"/>
    </style:style>
    <style:style style:name="P13" style:family="paragraph" style:parent-style-name="Standard">
      <style:text-properties style:font-name="Caladea" fo:font-size="10pt" fo:language="es" fo:country="ES" officeooo:rsid="017fbb91" officeooo:paragraph-rsid="016475cb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Caladea" fo:font-size="42pt" fo:language="es" fo:country="ES" officeooo:rsid="01876b88" officeooo:paragraph-rsid="01876b88" style:font-size-asian="42pt" style:font-size-complex="42pt"/>
    </style:style>
    <style:style style:name="P15" style:family="paragraph" style:parent-style-name="Text_20_body">
      <style:text-properties style:font-name="Caladea" fo:font-size="14pt" fo:language="es" fo:country="ES" officeooo:rsid="01876a97" officeooo:paragraph-rsid="01876a97" style:font-size-asian="12.25pt" style:font-size-complex="14pt"/>
    </style:style>
    <style:style style:name="P16" style:family="paragraph" style:parent-style-name="Text_20_body">
      <style:text-properties style:font-name="Caladea" fo:font-size="14pt" officeooo:rsid="01876a97" officeooo:paragraph-rsid="01876a97" style:font-size-asian="12.25pt" style:font-size-complex="14pt"/>
    </style:style>
    <style:style style:name="P17" style:family="paragraph" style:parent-style-name="Text_20_body">
      <style:paragraph-properties fo:margin-top="0cm" fo:margin-bottom="0.101cm" style:contextual-spacing="false"/>
      <style:text-properties style:font-name="Caladea" fo:font-size="14pt" fo:language="es" fo:country="ES" officeooo:rsid="01876a97" style:font-size-asian="12.25pt" style:font-size-complex="14pt"/>
    </style:style>
    <style:style style:name="P18" style:family="paragraph" style:parent-style-name="Text_20_body">
      <style:paragraph-properties fo:margin-top="0cm" fo:margin-bottom="0.101cm" style:contextual-spacing="false"/>
      <style:text-properties style:font-name="Caladea" fo:font-size="14pt" officeooo:rsid="01876a97" style:font-size-asian="12.25pt" style:font-size-complex="14pt"/>
    </style:style>
    <style:style style:name="P19" style:family="paragraph" style:parent-style-name="Text_20_body" style:list-style-name="L1">
      <style:paragraph-properties fo:margin-top="0cm" fo:margin-bottom="0.101cm" style:contextual-spacing="false"/>
      <style:text-properties style:font-name="Caladea" fo:font-size="14pt" fo:language="es" fo:country="ES" officeooo:rsid="01876a97" style:font-size-asian="12.25pt" style:font-size-complex="14pt"/>
    </style:style>
    <style:style style:name="P20" style:family="paragraph" style:parent-style-name="Heading_20_3">
      <style:paragraph-properties fo:margin-top="0cm" fo:margin-bottom="0.101cm" style:contextual-spacing="false" fo:break-before="page"/>
      <style:text-properties style:font-name="Caladea" officeooo:rsid="01876a97" style:font-size-asian="12.25pt"/>
    </style:style>
    <style:style style:name="P21" style:family="paragraph" style:parent-style-name="Text_20_body" style:list-style-name="L2">
      <style:paragraph-properties fo:margin-top="0cm" fo:margin-bottom="0.101cm" style:contextual-spacing="false"/>
      <style:text-properties style:font-name="Caladea" fo:font-size="14pt" officeooo:rsid="01876a97" style:font-size-asian="12.25pt" style:font-size-complex="14pt"/>
    </style:style>
    <style:style style:name="P22" style:family="paragraph" style:parent-style-name="Horizontal_20_Line">
      <style:paragraph-properties fo:margin-top="0cm" fo:margin-bottom="0.101cm" style:contextual-spacing="false"/>
      <style:text-properties style:font-name="Caladea" fo:font-size="14pt" fo:language="es" fo:country="ES" officeooo:rsid="01876a97" style:font-size-asian="12.25pt" style:font-size-complex="14pt"/>
    </style:style>
    <style:style style:name="P23" style:family="paragraph" style:parent-style-name="Heading_20_3">
      <style:paragraph-properties fo:margin-top="0cm" fo:margin-bottom="0.101cm" style:contextual-spacing="false"/>
      <style:text-properties style:font-name="Caladea" officeooo:rsid="01876a97" style:font-size-asian="12.25pt"/>
    </style:style>
    <style:style style:name="P24" style:family="paragraph" style:parent-style-name="Text_20_body" style:list-style-name="L3">
      <style:paragraph-properties fo:margin-top="0cm" fo:margin-bottom="0.101cm" style:contextual-spacing="false"/>
      <style:text-properties style:font-name="Caladea" fo:font-size="14pt" officeooo:rsid="01876a97" style:font-size-asian="12.25pt" style:font-size-complex="14pt"/>
    </style:style>
    <style:style style:name="P25" style:family="paragraph" style:parent-style-name="Standard">
      <style:text-properties style:font-name="Caladea" fo:font-size="14pt" fo:language="es" fo:country="ES" officeooo:rsid="01876a97" officeooo:paragraph-rsid="01876a97" style:font-size-asian="12.25pt" style:font-size-complex="14pt"/>
    </style:style>
    <style:style style:name="P26" style:family="paragraph" style:parent-style-name="Standard">
      <style:text-properties style:font-name="Caladea" fo:font-size="10pt" fo:language="es" fo:country="ES" officeooo:rsid="01876a97" officeooo:paragraph-rsid="01876a97" style:font-size-asian="10pt" style:font-size-complex="10pt"/>
    </style:style>
    <style:style style:name="P27" style:family="paragraph">
      <loext:graphic-properties draw:fill="solid" draw:fill-color="#f9f9f9"/>
      <style:paragraph-properties fo:text-align="center"/>
    </style:style>
    <style:style style:name="P28" style:family="paragraph">
      <loext:graphic-properties draw:fill="solid" draw:fill-color="#1c1c1c"/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letter-spacing="0.106cm" officeooo:rsid="0184be41"/>
    </style:style>
    <style:style style:name="T3" style:family="text">
      <style:text-properties fo:color="#000000" loext:opacity="100%" fo:letter-spacing="0.106cm" officeooo:rsid="0184be41"/>
    </style:style>
    <style:style style:name="T4" style:family="text">
      <style:text-properties fo:font-variant="small-caps" fo:color="#ffffff" loext:opacity="100%" style:font-name="Century gothic"/>
    </style:style>
    <style:style style:name="T5" style:family="text">
      <style:text-properties fo:font-variant="small-caps" style:font-name="Century gothic"/>
    </style:style>
    <style:style style:name="T6" style:family="text">
      <style:text-properties fo:font-variant="small-caps" fo:color="#ffffff" loext:opacity="100%" style:font-name="Century gothic" fo:letter-spacing="0.106cm" officeooo:rsid="014cbadf"/>
    </style:style>
    <style:style style:name="T7" style:family="text">
      <style:text-properties fo:font-variant="small-caps" fo:color="#ffffff" loext:opacity="100%" style:font-name="Century gothic" fo:letter-spacing="0.106cm" officeooo:rsid="0185fd7d"/>
    </style:style>
    <style:style style:name="T8" style:family="text">
      <style:text-properties fo:font-variant="small-caps" fo:color="#000000" loext:opacity="100%" style:font-name="Century gothic" fo:letter-spacing="0.106cm" officeooo:rsid="01619f3c"/>
    </style:style>
    <style:style style:name="T9" style:family="text">
      <style:text-properties fo:font-variant="small-caps" fo:color="#000000" loext:opacity="100%" style:font-name="Century gothic" fo:letter-spacing="0.106cm" officeooo:rsid="0185fd7d"/>
    </style:style>
    <style:style style:name="T10" style:family="text">
      <style:text-properties fo:font-variant="small-caps" style:font-name="Century gothic" fo:font-weight="bold" officeooo:rsid="0067f641" style:font-weight-asian="bold" style:font-weight-complex="bold"/>
    </style:style>
    <style:style style:name="T11" style:family="text">
      <style:text-properties fo:font-variant="small-caps" fo:color="#ffffff" loext:opacity="100%" style:font-name="Century gothic" fo:letter-spacing="0.106cm" fo:font-weight="bold" officeooo:rsid="0067f641" style:font-weight-asian="bold" style:font-weight-complex="bold"/>
    </style:style>
    <style:style style:name="T12" style:family="text">
      <style:text-properties fo:font-variant="small-caps" style:font-name="Century gothic" fo:letter-spacing="0.106cm" fo:font-weight="bold" officeooo:rsid="0067f641" style:font-weight-asian="bold" style:font-weight-complex="bold"/>
    </style:style>
    <style:style style:name="T13" style:family="text">
      <style:text-properties fo:font-variant="small-caps" style:font-name="Century gothic" fo:letter-spacing="0.106cm" fo:font-weight="bold" officeooo:rsid="0185fd7d" style:font-weight-asian="bold" style:font-weight-complex="bold"/>
    </style:style>
    <style:style style:name="T14" style:family="text">
      <style:text-properties fo:language="es" fo:country="E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stroke-linejoin="none" draw:fill="solid" draw:fill-color="#f9f9f9" draw:textarea-horizontal-align="justify" draw:textarea-vertical-align="middle" draw:auto-grow-height="false" fo:min-height="29.861cm" fo:min-width="10.673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linejoin="none" draw:fill="solid" draw:fill-color="#1c1c1c" draw:textarea-horizontal-align="justify" draw:textarea-vertical-align="middle" draw:auto-grow-height="false" fo:min-height="29.977cm" fo:min-width="12.26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ortada"/></text:p>
      <text:p text:style-name="P1"/>
      <text:p text:style-name="P2"><text:span text:style-name="T1"><text:tab/></text:span><text:span text:style-name="T2">Prop</text:span><text:span text:style-name="T3">u</text:span><text:span text:style-name="T3">esta</text:span></text:p>
      <text:p text:style-name="P3"><text:span text:style-name="T1"><text:tab/></text:span>Inic<text:span text:style-name="T1">ial</text:span></text:p>
      <text:p text:style-name="P4"/>
      <text:p text:style-name="P4"/>
      <text:p text:style-name="P4"/>
      <text:p text:style-name="P5"><text:span text:style-name="T4">Por</text:span><text:span text:style-name="T5"> Selam</text:span></text:p>
      <text:p text:style-name="P6"><text:tab/>Bel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tab/></text:p>
      <text:p text:style-name="P9"/>
      <text:p text:style-name="P10"><text:tab/></text:p>
      <text:p text:style-name="P11"><text:span text:style-name="T6"><text:tab/></text:span><text:span text:style-name="T7">03</text:span><text:span text:style-name="T8">/</text:span><text:span text:style-name="T9">10</text:span></text:p>
      <text:p text:style-name="P12"><text:span text:style-name="T10"><text:tab/></text:span><text:span text:style-name="T11">20</text:span><text:span text:style-name="T12">2</text:span><text:span text:style-name="T13">5</text:span></text:p>
      <text:p text:style-name="P13"/>
      <text:p text:style-name="P14"><text:soft-page-break/>Foro interactivo</text:p>
      <text:p text:style-name="P15"/>
      <text:p text:style-name="P16"><text:span text:style-name="T14">La idea es desarrollar una web con un diseño sencillo pero atractivo, que funcione como un </text:span><text:span text:style-name="Strong_20_Emphasis"><text:span text:style-name="T14">foro temático</text:span></text:span><text:span text:style-name="T14">. Su propósito será permitir a los usuarios crear publicaciones, comentar en hilos y reaccionar a los contenidos de otros, fomentando la interacción en torno a un tema específico (El tema/s aún no lo/s he escogido).</text:span></text:p>
      <text:p text:style-name="P17">El proyecto busca ser una especie de versión reducida y accesible de una red social, enfocada en un nicho concreto. La meta es que sea una aplicación clara, fácil de usar y que permita a los usuarios compartir ideas de manera estructurada.</text:p>
      <text:p text:style-name="P18"><text:span text:style-name="T14">La aplicación tendrá un </text:span><text:span text:style-name="Strong_20_Emphasis"><text:span text:style-name="T14">sistema de usuarios</text:span></text:span><text:span text:style-name="T14"> que permita registrarse, iniciar sesión y gestionar un perfil básico. Cada usuario podrá:</text:span></text:p>
      <text:list text:style-name="L1">
        <text:list-item>
          <text:p text:style-name="P19">Crear nuevas publicaciones en categorías temáticas.</text:p>
        </text:list-item>
        <text:list-item>
          <text:p text:style-name="P19">Comentar y responder a publicaciones.</text:p>
        </text:list-item>
        <text:list-item>
          <text:p text:style-name="P19">Reaccionar a publicaciones con un sistema sencillo de “me gusta” o votos.</text:p>
        </text:list-item>
      </text:list>
      <text:p text:style-name="P17">El diseño inicial se centrará en HTML y CSS para la maquetación y estilo, y dependiendo de lo que se imparta en el curso lectivo, se añadirán otras tecnologías como node.js.</text:p>
      <text:h text:style-name="P20" text:outline-level="3"><text:span text:style-name="Strong_20_Emphasis"><text:span text:style-name="T14">Funcionalidades principales previstas</text:span></text:span></text:h>
      <text:list text:style-name="L2">
        <text:list-item>
          <text:p text:style-name="P21"><text:span text:style-name="Strong_20_Emphasis"><text:span text:style-name="T14">Gestión de usuarios</text:span></text:span><text:span text:style-name="T14">: registro, inicio de sesión, edición de perfil.</text:span></text:p>
        </text:list-item>
        <text:list-item>
          <text:p text:style-name="P21"><text:span text:style-name="Strong_20_Emphasis"><text:span text:style-name="T14">Creación de publicaciones</text:span></text:span><text:span text:style-name="T14">: título, contenido y categoría asignada.</text:span></text:p>
        </text:list-item>
        <text:list-item>
          <text:p text:style-name="P21"><text:span text:style-name="Strong_20_Emphasis"><text:span text:style-name="T14">Comentarios</text:span></text:span><text:span text:style-name="T14">: los usuarios podrán responder y generar discusiones en torno a un post.</text:span></text:p>
        </text:list-item>
        <text:list-item>
          <text:p text:style-name="P21"><text:span text:style-name="Strong_20_Emphasis"><text:span text:style-name="T14">Reacciones o votos</text:span></text:span><text:span text:style-name="T14">: sistema de interacción simple (like o voto positivo/negativo).</text:span></text:p>
        </text:list-item>
        <text:list-item>
          <text:p text:style-name="P21"><text:span text:style-name="Strong_20_Emphasis"><text:span text:style-name="T14">Perfil de usuario</text:span></text:span><text:span text:style-name="T14">: listado de publicaciones propias y actividad reciente.</text:span></text:p>
        </text:list-item>
      </text:list>
      <text:p text:style-name="P22"/>
      <text:h text:style-name="P23" text:outline-level="3"><text:span text:style-name="Strong_20_Emphasis"><text:span text:style-name="T14"/></text:span></text:h>
      <text:h text:style-name="P23" text:outline-level="3"><text:span text:style-name="Strong_20_Emphasis"><text:span text:style-name="T14">Roles de usuario</text:span></text:span></text:h>
      <text:list text:style-name="L3">
        <text:list-item>
          <text:p text:style-name="P24"><text:span text:style-name="Strong_20_Emphasis"><text:span text:style-name="T14">Usuario registrado</text:span></text:span><text:span text:style-name="T14">: podrá crear, comentar y reaccionar a publicaciones, además de seguir temas.</text:span></text:p>
        </text:list-item>
        <text:list-item>
          <text:p text:style-name="P24"><text:span text:style-name="Strong_20_Emphasis"><text:span text:style-name="T14">Moderador</text:span></text:span><text:span text:style-name="T14">: tendrá la capacidad de editar o eliminar publicaciones y comentarios que no respeten las normas del foro.</text:span></text:p>
        </text:list-item>
      </text:list>
      <text:p text:style-name="P22"/>
      <text:p text:style-name="P17"/>
      <text:p text:style-name="P25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entury gothic" svg:font-family="'Century gothic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stilo_20_de_20_dibujo_20_predeterminado" style:display-name="Estilo de dibujo predeterminado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Roboto" style:font-family-complex="Roboto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Roboto" style:font-family-complex="Roboto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1" style:display-name="TITLE_ONLY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TITLE_5f_ONLY_7e_LT_7e_Hintergrund" style:display-name="TITLE_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TITLE_5f_AND_5f_TWO_5f_COLUMNS_7e_LT_7e_Gliederung_20_1" style:display-name="TITLE_AND_TWO_COLUMNS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AND_5f_TWO_5f_COLUMNS_7e_LT_7e_Gliederung_20_2" style:display-name="TITLE_AND_TWO_COLUMNS~LT~Gliederung 2" style:family="paragraph" style:parent-style-name="TITLE_5f_AND_5f_TWO_5f_COLUMNS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3" style:display-name="TITLE_AND_TWO_COLUMNS~LT~Gliederung 3" style:family="paragraph" style:parent-style-name="TITLE_5f_AND_5f_TWO_5f_COLUMNS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4" style:display-name="TITLE_AND_TWO_COLUMNS~LT~Gliederung 4" style:family="paragraph" style:parent-style-name="TITLE_5f_AND_5f_TWO_5f_COLUMNS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5" style:display-name="TITLE_AND_TWO_COLUMNS~LT~Gliederung 5" style:family="paragraph" style:parent-style-name="TITLE_5f_AND_5f_TWO_5f_COLUMNS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6" style:display-name="TITLE_AND_TWO_COLUMNS~LT~Gliederung 6" style:family="paragraph" style:parent-style-name="TITLE_5f_AND_5f_TWO_5f_COLUMNS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7" style:display-name="TITLE_AND_TWO_COLUMNS~LT~Gliederung 7" style:family="paragraph" style:parent-style-name="TITLE_5f_AND_5f_TWO_5f_COLUMNS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8" style:display-name="TITLE_AND_TWO_COLUMNS~LT~Gliederung 8" style:family="paragraph" style:parent-style-name="TITLE_5f_AND_5f_TWO_5f_COLUMNS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9" style:display-name="TITLE_AND_TWO_COLUMNS~LT~Gliederung 9" style:family="paragraph" style:parent-style-name="TITLE_5f_AND_5f_TWO_5f_COLUMNS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Titel" style:display-name="TITLE_AND_TWO_COLUMNS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AND_5f_TWO_5f_COLUMNS_7e_LT_7e_Untertitel" style:display-name="TITLE_AND_TWO_COLUMN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AND_5f_TWO_5f_COLUMNS_7e_LT_7e_Notizen" style:display-name="TITLE_AND_TWO_COLUMNS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AND_5f_TWO_5f_COLUMNS_7e_LT_7e_Hintergrundobjekte" style:display-name="TITLE_AND_TWO_COLUMN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TITLE_5f_AND_5f_TWO_5f_COLUMNS_7e_LT_7e_Hintergrund" style:display-name="TITLE_AND_TWO_COLUMN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6.801cm" style:type="right"/>
          <style:tab-stop style:position="16.907cm"/>
        </style:tab-stops>
      </style:paragraph-properties>
      <style:text-properties fo:language="es" fo:country="ES" officeooo:rsid="00131be6" officeooo:paragraph-rsid="00131be6"/>
    </style:style>
    <style:style style:name="MP2" style:family="paragraph">
      <loext:graphic-properties draw:fill="solid" draw:fill-color="#1c1c1c"/>
      <style:paragraph-properties fo:text-align="center"/>
    </style:style>
    <style:style style:name="MP3" style:family="paragraph">
      <loext:graphic-properties draw:fill="solid" draw:fill-color="#f9f9f9"/>
      <style:paragraph-properties fo:text-align="center"/>
    </style:style>
    <style:style style:name="MP4" style:family="paragraph" style:parent-style-name="Footer">
      <style:paragraph-properties>
        <style:tab-stops>
          <style:tab-stop style:position="8.5cm" style:type="center"/>
          <style:tab-stop style:position="16.999cm" style:type="right"/>
          <style:tab-stop style:position="17cm" style:type="right"/>
        </style:tab-stops>
      </style:paragraph-properties>
      <style:text-properties fo:language="es" fo:country="ES" officeooo:paragraph-rsid="00b116f8"/>
    </style:style>
    <style:style style:name="MP5" style:family="paragraph" style:parent-style-name="Footer">
      <style:paragraph-properties>
        <style:tab-stops>
          <style:tab-stop style:position="8.5cm" style:type="center"/>
          <style:tab-stop style:position="16.999cm" style:type="right"/>
          <style:tab-stop style:position="17cm" style:type="right"/>
        </style:tab-stops>
      </style:paragraph-properties>
      <style:text-properties fo:language="es" fo:country="ES"/>
    </style:style>
    <style:style style:name="MT1" style:family="text">
      <style:text-properties style:font-name="Caladea"/>
    </style:style>
    <style:style style:name="Mgr1" style:family="graphic">
      <style:graphic-properties draw:stroke="none" draw:stroke-linejoin="none" draw:fill="solid" draw:fill-color="#1c1c1c" draw:textarea-horizontal-align="justify" draw:textarea-vertical-align="middle" draw:auto-grow-height="false" fo:min-height="29.977cm" fo:min-width="12.26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stroke-linejoin="none" draw:fill="solid" draw:fill-color="#f9f9f9" draw:textarea-horizontal-align="justify" draw:textarea-vertical-align="middle" draw:auto-grow-height="false" fo:min-height="29.861cm" fo:min-width="10.673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span text:style-name="MT1">Selam Belkharroub Jerez<text:tab/><text:tab/></text:span><text:span text:style-name="MT1"><text:date style:data-style-name="N37" text:date-value="2025-10-03T12:16:01.436233017">03/10/25</text:date></text:span><text:span text:style-name="MT1"><text:tab/></text:span><text:tab/></text:p>
      </style:header>
      <style:header-first>
        <text:p text:style-name="MP1"><draw:custom-shape text:anchor-type="paragraph" draw:z-index="0" draw:name="Forma 1" draw:style-name="Mgr1" draw:text-style-name="MP2" svg:width="12.265cm" svg:height="29.978cm" svg:x="-4.036cm" svg:y="-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Forma 2" draw:style-name="Mgr2" draw:text-style-name="MP3" svg:width="10.674cm" svg:height="29.862cm" svg:x="8.327cm" svg:y="-2cm"><text:p/><draw:enhanced-geometry svg:viewBox="0 0 21600 21600" draw:mirror-horizontal="false" draw:mirror-vertical="false" draw:type="rectangle" draw:enhanced-path="M 0 0 L 21600 0 21600 21600 0 21600 0 0 Z N"/></draw:custom-shape><text:span text:style-name="MT1"><text:tab/></text:span><text:tab/></text:p>
      </style:header-first>
      <style:footer>
        <text:p text:style-name="MP4"><text:tab/><text:page-number text:select-page="current">2</text:page-number>-<text:page-count>3</text:page-count></text:p>
      </style:footer>
      <style:footer-first>
        <text:p text:style-name="MP5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16T09:49:44.741000000</meta:creation-date>
    <dc:date>2025-10-03T12:16:01.373372900</dc:date>
    <meta:editing-duration>PT17H44M59S</meta:editing-duration>
    <meta:editing-cycles>296</meta:editing-cycles>
    <meta:generator>LibreOffice/25.8.1.1$Windows_X86_64 LibreOffice_project/54047653041915e595ad4e45cccea684809c77b5</meta:generator>
    <meta:document-statistic meta:table-count="0" meta:image-count="0" meta:object-count="0" meta:page-count="3" meta:paragraph-count="29" meta:word-count="282" meta:character-count="1774" meta:non-whitespace-character-count="1513"/>
  </office:meta>
</office:document-meta>
</file>